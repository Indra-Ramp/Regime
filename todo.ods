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98in"/>
    </style:style>
    <style:style style:name="co2" style:family="table-column">
      <style:table-column-properties fo:break-before="auto" style:column-width="2.502in"/>
    </style:style>
    <style:style style:name="co3" style:family="table-column">
      <style:table-column-properties fo:break-before="auto" style:column-width="6.7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5983b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5983b0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emps estime</text:p>
          </table:table-cell>
          <table:table-cell table:style-name="ce1" office:value-type="string" calcext:value-type="string">
            <text:p>Temps reste</text:p>
          </table:table-cell>
          <table:table-cell table:style-name="ce1" office:value-type="string" calcext:value-type="string">
            <text:p>Temps pass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Avanceme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d, nom, prenom, email, genre, password_hash, r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ra</text:p>
          </table:table-cell>
          <table:table-cell table:style-name="ce3" table:formula="of:=[.F2]/([.E2]+[.F2])" office:value-type="percentage" office:value="0" calcext:value-type="percentage">
            <text:p>0.00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id, role</text:p>
          </table:table-cell>
          <table:table-cell table:number-columns-repeated="4"/>
          <table:table-cell table:style-name="ce3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rofil</text:p>
          </table:table-cell>
          <table:table-cell office:value-type="string" calcext:value-type="string">
            <text:p>id, id_utilisateur, telephone, date_naiss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ra</text:p>
          </table:table-cell>
          <table:table-cell table:style-name="ce3" table:formula="of:=[.F4]/([.E4]+[.F4])" office:value-type="percentage" office:value="0" calcext:value-type="percentage">
            <text:p>0.00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uivi_sante</text:p>
          </table:table-cell>
          <table:table-cell office:value-type="string" calcext:value-type="string">
            <text:p>id, id_utilisateur, poids, taille, date_suiv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ra</text:p>
          </table:table-cell>
          <table:table-cell table:style-name="ce3" table:formula="of:=[.F5]/([.E5]+[.F5])" office:value-type="percentage" office:value="0" calcext:value-type="percentage">
            <text:p>0.00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activite_sportive</text:p>
          </table:table-cell>
          <table:table-cell office:value-type="string" calcext:value-type="string">
            <text:p>id, label, variation_poids, frequ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ra</text:p>
          </table:table-cell>
          <table:table-cell table:style-name="ce3" table:formula="of:=[.F6]/([.E6]+[.F6])" office:value-type="percentage" office:value="0" calcext:value-type="percentage">
            <text:p>0.00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regime</text:p>
          </table:table-cell>
          <table:table-cell office:value-type="string" calcext:value-type="string">
            <text:p>id, perc_viande, perc_poisson, perc_volaille, variation_poids, duree, pr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ra</text:p>
          </table:table-cell>
          <table:table-cell table:style-name="ce3" table:formula="of:=[.F7]/([.E7]+[.F7])" office:value-type="percentage" office:value="0" calcext:value-type="percentage">
            <text:p>0.00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objectif</text:p>
          </table:table-cell>
          <table:table-cell office:value-type="string" calcext:value-type="string">
            <text:p>id, l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ra</text:p>
          </table:table-cell>
          <table:table-cell table:style-name="ce3" table:formula="of:=[.F8]/([.E8]+[.F8])" office:value-type="percentage" office:value="0" calcext:value-type="percentage">
            <text:p>0.00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objectif_user</text:p>
          </table:table-cell>
          <table:table-cell office:value-type="string" calcext:value-type="string">
            <text:p>id, id_utilisateur, id_objectif, date_objectif, val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ra</text:p>
          </table:table-cell>
          <table:table-cell table:style-name="ce3" table:formula="of:=[.F9]/([.E9]+[.F9])" office:value-type="percentage" office:value="0" calcext:value-type="percentage">
            <text:p>0.00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id, code, mont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ra</text:p>
          </table:table-cell>
          <table:table-cell table:style-name="ce3" table:formula="of:=[.F10]/([.E10]+[.F10])" office:value-type="percentage" office:value="0" calcext:value-type="percentage">
            <text:p>0.00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orte_monnaie</text:p>
          </table:table-cell>
          <table:table-cell office:value-type="string" calcext:value-type="string">
            <text:p>id, id_utilisateur, montant (default 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ra</text:p>
          </table:table-cell>
          <table:table-cell table:style-name="ce3" table:formula="of:=[.F11]/([.E11]+[.F11])" office:value-type="percentage" office:value="0" calcext:value-type="percentage">
            <text:p>0.00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onfig</text:p>
          </table:table-cell>
          <table:table-cell office:value-type="string" calcext:value-type="string">
            <text:p>id, cle, val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ra</text:p>
          </table:table-cell>
          <table:table-cell table:style-name="ce3" table:formula="of:=[.F12]/([.E12]+[.F12])" office:value-type="percentage" office:value="0" calcext:value-type="percentage">
            <text:p>0.00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ype_abonnement</text:p>
          </table:table-cell>
          <table:table-cell office:value-type="string" calcext:value-type="string">
            <text:p>id, label, montant, perc_redu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ra</text:p>
          </table:table-cell>
          <table:table-cell table:style-name="ce3" table:formula="of:=[.F13]/([.E13]+[.F13])" office:value-type="percentage" office:value="0" calcext:value-type="percentage">
            <text:p>0.00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ype_abonnement_user</text:p>
          </table:table-cell>
          <table:table-cell office:value-type="string" calcext:value-type="string">
            <text:p>id, id_utilisateur, id_abonnement (default 1), date_abonn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ra</text:p>
          </table:table-cell>
          <table:table-cell table:style-name="ce3" table:formula="of:=[.F14]/([.E14]+[.F14])" office:value-type="percentage" office:value="0" calcext:value-type="percentage">
            <text:p>0.00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regime_user</text:p>
          </table:table-cell>
          <table:table-cell office:value-type="string" calcext:value-type="string">
            <text:p>id, id_utilisateur, id_regime, date_regime, duree, id_activite, pr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ra</text:p>
          </table:table-cell>
          <table:table-cell table:style-name="ce3" table:formula="of:=[.F15]/([.E15]+[.F15])" office:value-type="percentage" office:value="0" calcext:value-type="percentage">
            <text:p>0.00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ode_user</text:p>
          </table:table-cell>
          <table:table-cell office:value-type="string" calcext:value-type="string">
            <text:p>id, id_user, code, statut, date_track</text:p>
          </table:table-cell>
          <table:table-cell table:number-columns-repeated="4"/>
          <table:table-cell table:style-name="ce3"/>
          <table:table-cell table:number-columns-repeated="16376"/>
        </table:table-row>
        <table:table-row table:style-name="ro1">
          <table:table-cell table:style-name="ce2" office:value-type="string" calcext:value-type="string">
            <text:p>Fonctionnalites</text:p>
          </table:table-cell>
          <table:table-cell table:style-name="ce2"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Inscription</text:p>
          </table:table-cell>
          <table:table-cell office:value-type="string" calcext:value-type="string">
            <text:p>signin.php</text:p>
          </table:table-cell>
          <table:table-cell office:value-type="string" calcext:value-type="string">
            <text:p>Creation du html statique (1ere et 2e etape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serModel.php</text:p>
          </table:table-cell>
          <table:table-cell office:value-type="string" calcext:value-type="string">
            <text:p>Creation du model de l’utilisateu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Mise en place des regles de validation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onnaieModel.php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uiviSanteModel.php</text:p>
          </table:table-cell>
          <table:table-cell office:value-type="string" calcext:value-type="string">
            <text:p>Mise en place des regles de validation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bonnementUserModel.php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UserController.php</text:p>
          </table:table-cell>
          <table:table-cell office:value-type="string" calcext:value-type="string">
            <text:p>Methodes: signin() [Insertion abonnement standard, creation porte monnaie avec 0 Ar], insertSante() 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ogin </text:p>
          </table:table-cell>
          <table:table-cell office:value-type="string" calcext:value-type="string">
            <text:p>login.php</text:p>
          </table:table-cell>
          <table:table-cell office:value-type="string" calcext:value-type="string">
            <text:p>page html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serController.php</text:p>
          </table:table-cell>
          <table:table-cell office:value-type="string" calcext:value-type="string">
            <text:p>login(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fil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Creation du html statique (Ato koa no ampiana formulaire ho an’ny objectif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rofil.php</text:p>
          </table:table-cell>
          <table:table-cell office:value-type="string" calcext:value-type="string">
            <text:p>formulaire de recharge de porte monnai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rofil.php</text:p>
          </table:table-cell>
          <table:table-cell office:value-type="string" calcext:value-type="string">
            <text:p>Affichage de la suggestion des regimes 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gimeModel.php</text:p>
          </table:table-cell>
          <table:table-cell office:value-type="string" calcext:value-type="string">
            <text:p>CRUD regim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serController.php</text:p>
          </table:table-cell>
          <table:table-cell office:value-type="string" calcext:value-type="string">
            <text:p>SuggestionRegime(idUtilisateur) + variation de poids selon la dure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serController.php</text:p>
          </table:table-cell>
          <table:table-cell office:value-type="string" calcext:value-type="string">
            <text:p>getProfil(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rofil.php</text:p>
          </table:table-cell>
          <table:table-cell office:value-type="string" calcext:value-type="string">
            <text:p>Integration php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mplete-profil.php</text:p>
          </table:table-cell>
          <table:table-cell office:value-type="string" calcext:value-type="string">
            <text:p>Creation du html statique avec formulaire avec etape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rofilModel.php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UserController.php</text:p>
          </table:table-cell>
          <table:table-cell office:value-type="string" calcext:value-type="string">
            <text:p>completeProfil(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ObjectifUserModel.php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UserController.php</text:p>
          </table:table-cell>
          <table:table-cell office:value-type="string" calcext:value-type="string">
            <text:p>insertObjectif(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rofil.php</text:p>
          </table:table-cell>
          <table:table-cell office:value-type="string" calcext:value-type="string">
            <text:p>Passer en mode GOLD (Se desabonner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rofil.php</text:p>
          </table:table-cell>
          <table:table-cell office:value-type="string" calcext:value-type="string">
            <text:p>formulaire update poid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Misy ny monnaie sy ny username an’ilay user sy type d’abonnemen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BACKOFFICE</text:p>
          </table:table-cell>
          <table:table-cell table:style-name="ce2" table:number-columns-repeated="16383"/>
        </table:table-row>
        <table:table-row table:style-name="ro1">
          <table:table-cell office:value-type="string" calcext:value-type="string">
            <text:p>Login </text:p>
          </table:table-cell>
          <table:table-cell office:value-type="string" calcext:value-type="string">
            <text:p>login.php</text:p>
          </table:table-cell>
          <table:table-cell office:value-type="string" calcext:value-type="string">
            <text:p>page html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serController.php</text:p>
          </table:table-cell>
          <table:table-cell office:value-type="string" calcext:value-type="string">
            <text:p>login(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bleau de bord 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page html (statistics de nombre d’utilisateurs, rapport entre user GOLD et Standard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dminController.php</text:p>
          </table:table-cell>
          <table:table-cell office:value-type="string" calcext:value-type="string">
            <text:p>StatUser(nbreUser) → alaina ny standard sy gold 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nctionnalités</text:p>
          </table:table-cell>
          <table:table-cell office:value-type="string" calcext:value-type="string">
            <text:p>ActiviteModel.php</text:p>
          </table:table-cell>
          <table:table-cell office:value-type="string" calcext:value-type="string">
            <text:p>CRUD activit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dminController.php</text:p>
          </table:table-cell>
          <table:table-cell office:value-type="string" calcext:value-type="string">
            <text:p>ValidationCode(code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gimeController.php</text:p>
          </table:table-cell>
          <table:table-cell office:value-type="string" calcext:value-type="string">
            <text:p>CRUD regime ( Formulaire admin plus misafidy prix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Routes </text:p>
          </table:table-cell>
          <table:table-cell table:style-name="ce2" table:number-columns-repeated="16383"/>
        </table:table-row>
        <table:table-row table:style-name="ro1">
          <table:table-cell office:value-type="string" calcext:value-type="string">
            <text:p>Login 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To Log IN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scription</text:p>
          </table:table-cell>
          <table:table-cell office:value-type="string" calcext:value-type="string">
            <text:p>/inscription/(:num)</text:p>
          </table:table-cell>
          <table:table-cell office:value-type="string" calcext:value-type="string">
            <text:p>To Sign In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youts</text:p>
          </table:table-cell>
          <table:table-cell office:value-type="string" calcext:value-type="string">
            <text:p>/profil</text:p>
          </table:table-cell>
          <table:table-cell office:value-type="string" calcext:value-type="string">
            <text:p>To enter My Profil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OST: /profil/objectifs </text:p>
          </table:table-cell>
          <table:table-cell office:value-type="string" calcext:value-type="string">
            <text:p>Insertion objectif + suggestion regimes 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OST: /profil/gold </text:p>
          </table:table-cell>
          <table:table-cell office:value-type="string" calcext:value-type="string">
            <text:p>Mode GOLD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ET: /profil/completion</text:p>
          </table:table-cell>
          <table:table-cell office:value-type="string" calcext:value-type="string">
            <text:p>Formulaire d’insertion completion (table profil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OST: /profil/completion</text:p>
          </table:table-cell>
          <table:table-cell office:value-type="string" calcext:value-type="string">
            <text:p>Insertion completion <text:s/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/admin/dashboard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/admin/regime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OST: /admin/regimes/delete/(:num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/admin/regimes/add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OST: /admin/regimes/add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/admin/regimes/(:num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OST: /admin/regimes/(:num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/admin/activit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/admin/activite/delete/(:num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/admin/activite/add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OST: /admin/activite/add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/admin/activite/(:num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OST: /admin/activite/(:num)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/00/0000</text:date>, <text:time style:data-style-name="N2" text:time-value="07:49:59.1434758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6T10:31:39.526538296</meta:creation-date>
    <dc:date>2026-05-08T10:47:12.038612149</dc:date>
    <meta:editing-duration>PT4H24M14S</meta:editing-duration>
    <meta:editing-cycles>50</meta:editing-cycles>
    <meta:generator>LibreOffice/24.2.7.2$Linux_X86_64 LibreOffice_project/420$Build-2</meta:generator>
    <meta:document-statistic meta:table-count="1" meta:cell-count="203" meta:object-count="0"/>
  </office:meta>
</office:document-meta>
</file>